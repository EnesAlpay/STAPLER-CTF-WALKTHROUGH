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D90E59030E89F19F7B.png" manifest:media-type="image/png"/>
  <manifest:file-entry manifest:full-path="Pictures/1000000000000780000003D9F7888F1B42622390.png" manifest:media-type="image/png"/>
  <manifest:file-entry manifest:full-path="Pictures/1000000000000780000003D909F4B71130D21E67.png" manifest:media-type="image/png"/>
  <manifest:file-entry manifest:full-path="Pictures/1000000000000780000003D94DA72C0107A6F969.png" manifest:media-type="image/png"/>
  <manifest:file-entry manifest:full-path="Pictures/1000000000000780000003D9153FB2A5692A3B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550" officeooo:paragraph-rsid="00165550"/>
    </style:style>
    <style:style style:name="P2" style:family="paragraph" style:parent-style-name="Standard">
      <style:text-properties officeooo:rsid="00180eb4" officeooo:paragraph-rsid="00180eb4"/>
    </style:style>
    <style:style style:name="P3" style:family="paragraph" style:parent-style-name="Standard">
      <style:text-properties officeooo:paragraph-rsid="00180eb4"/>
    </style:style>
    <style:style style:name="P4" style:family="paragraph" style:parent-style-name="Standard">
      <style:text-properties officeooo:rsid="00193a1d" officeooo:paragraph-rsid="00193a1d"/>
    </style:style>
    <style:style style:name="P5" style:family="paragraph" style:parent-style-name="Standard">
      <style:text-properties officeooo:rsid="001989ab" officeooo:paragraph-rsid="001989ab"/>
    </style:style>
    <style:style style:name="T1" style:family="text">
      <style:text-properties officeooo:rsid="00180eb4"/>
    </style:style>
    <style:style style:name="T2" style:family="text">
      <style:text-properties officeooo:rsid="001989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pler ctf çözüm adımları:</text:p>
      <text:p text:style-name="P1"/>
      <text:p text:style-name="P1">Adım1:</text:p>
      <text:p text:style-name="P1"/>
      <text:p text:style-name="P1">İlk olarak netdiscover -i eth0 -c 100 -r 10.0.2.0/24 bu netdiscover komutu ile ip adresini tespit ediyorum.</text:p>
      <text:p text:style-name="P1"/>
      <text:p text:style-name="P1"/>
      <text:p text:style-name="P1"><draw:frame draw:style-name="fr1" draw:name="Image1" text:anchor-type="char" svg:width="17cm" svg:height="8.721cm" draw:z-index="0"><draw:image xlink:href="Pictures/1000000000000780000003D9153FB2A5692A3BE5.png" xlink:type="simple" xlink:show="embed" xlink:actuate="onLoad" draw:mime-type="image/png"/></draw:frame><text:s/></text:p>
      <text:p text:style-name="P1"/>
      <text:p text:style-name="P1">Adım2:</text:p>
      <text:p text:style-name="P1"/>
      <text:p text:style-name="P1">Daha sonra <text:span text:style-name="T1">bu nmap taramasını çalıştırıyorum nmap -sS -sV -A -p- --script vulners 10.0.2.7 -T5</text:span></text:p>
      <text:p text:style-name="P1"/>
      <text:p text:style-name="P3"><text:span text:style-name="T1">-sS SYN taraması için, -sV </text:span>portlarda hangi hizmetlerin ve hangi sürümlerin çalıştığını <text:span text:style-name="T1">belirler,</text:span></text:p>
      <text:p text:style-name="P3">-<text:span text:style-name="T1">A agresif bir tarama başlatır - p – portların tamamını tarar, –script vulners bulunan açık portlar üzerinde bir zaafiyet taraması başlatur, -T5 tarama hızını maximuma ayarlar.Devamında ise </text:span></text:p>
      <text:p text:style-name="P2"><draw:frame draw:style-name="fr3" draw:name="Image2" text:anchor-type="char" svg:x="-0.159cm" svg:y="1.236cm" svg:width="17cm" svg:height="8.721cm" draw:z-index="1"><draw:image xlink:href="Pictures/1000000000000780000003D94DA72C0107A6F969.png" xlink:type="simple" xlink:show="embed" xlink:actuate="onLoad" draw:mime-type="image/png"/></draw:frame>şu çıktıları alıyorum:</text:p>
      <text:p text:style-name="P2"/>
      <text:p text:style-name="P4"><text:soft-page-break/>Adım3:</text:p>
      <text:p text:style-name="P4"/>
      <text:p text:style-name="P2">Burada çıktının ortalarına doğru Samba servisi ve versiyon numaraları gözüme çarpıyor.</text:p>
      <text:p text:style-name="P2"/>
      <text:p text:style-name="P4">Searchploit ile bir exploit araması yapıyorum</text:p>
      <text:p text:style-name="P4"/>
      <text:p text:style-name="P4"><draw:frame draw:style-name="fr1" draw:name="Image3" text:anchor-type="char" svg:width="17cm" svg:height="8.721cm" draw:z-index="2"><draw:image xlink:href="Pictures/1000000000000780000003D909F4B71130D21E67.png" xlink:type="simple" xlink:show="embed" xlink:actuate="onLoad" draw:mime-type="image/png"/></draw:frame></text:p>
      <text:p text:style-name="P4"/>
      <text:p text:style-name="P4">Adım4:</text:p>
      <text:p text:style-name="P4"/>
      <text:p text:style-name="P4">Daha sonra msfconsole çalıştırarak search komutu ile exploitimi aratıyorum ve use ile çıkan exploiti </text:p>
      <text:p text:style-name="P4"/>
      <text:p text:style-name="P4">kullanıma hazırlıyorum</text:p>
      <text:p text:style-name="P4"/>
      <text:p text:style-name="P4"><draw:frame draw:style-name="fr2" draw:name="Image4" text:anchor-type="char" svg:width="17cm" svg:height="8.721cm" draw:z-index="3"><draw:image xlink:href="Pictures/1000000000000780000003D9F7888F1B42622390.png" xlink:type="simple" xlink:show="embed" xlink:actuate="onLoad" draw:mime-type="image/png"/></draw:frame><text:s/></text:p>
      <text:p text:style-name="P4"><text:s/></text:p>
      <text:p text:style-name="P4"><text:soft-page-break/>Adım5:</text:p>
      <text:p text:style-name="P4"/>
      <text:p text:style-name="P4">show options komutu ile ayarları inceleyerek set komutu ile rhost ve rport belirliyorum <text:span text:style-name="T2">ve exploiti</text:span></text:p>
      <text:p text:style-name="P4"/>
      <text:p text:style-name="P5">çalıştırıyorum</text:p>
      <text:p text:style-name="P4"/>
      <text:p text:style-name="P4"><draw:frame draw:style-name="fr1" draw:name="Image5" text:anchor-type="char" svg:width="17cm" svg:height="8.721cm" draw:z-index="4"><draw:image xlink:href="Pictures/1000000000000780000003D90E59030E89F19F7B.png" xlink:type="simple" xlink:show="embed" xlink:actuate="onLoad" draw:mime-type="image/png"/></draw:frame><text:s/></text:p>
      <text:p text:style-name="P4"/>
      <text:p text:style-name="P4">Adım6:</text:p>
      <text:p text:style-name="P4"/>
      <text:p text:style-name="P5">shell yazarak bir bağlantı alıyorum ve bize bir bash shelli veriyor.</text:p>
      <text:p text:style-name="P5"/>
      <text:p text:style-name="P5">python -c "import pty; pty.spawn('/bin/sh')" bu komutu kullanarak sh shelli alıyoruz ve daha sonra</text:p>
      <text:p text:style-name="P5"/>
      <text:p text:style-name="P5">root dizininden flag.txt adlı dosyayı cat flag.txt yazark görüntülüyoruz ve capture the flag oyunu </text:p>
      <text:p text:style-name="P5"/>
      <text:p text:style-name="P5">burada son buluyor.</text:p>
      <text:p text:style-name="P5"/>
      <text:p text:style-name="P5">Ben çözerken çok keyif aldım umarım sizde eğlenmişsinizdir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5:26:13.550838770</meta:creation-date>
    <dc:date>2024-05-21T06:05:03.112136170</dc:date>
    <meta:editing-duration>PT6M39S</meta:editing-duration>
    <meta:editing-cycles>1</meta:editing-cycles>
    <meta:document-statistic meta:table-count="0" meta:image-count="5" meta:object-count="0" meta:page-count="3" meta:paragraph-count="27" meta:word-count="184" meta:character-count="1285" meta:non-whitespace-character-count="1117"/>
    <meta:generator>LibreOffice/7.3.7.2$Linux_X86_64 LibreOffice_project/30$Build-2</meta:generator>
  </office:meta>
</office:document-meta>
</file>